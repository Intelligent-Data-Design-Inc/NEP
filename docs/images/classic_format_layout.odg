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111cm" loext:decorative="false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809cm" fo:min-width="3.028cm" fo:wrap-option="wrap" style:writing-mode="lr-tb" loext:decorative="false"/>
      <style:paragraph-properties style:writing-mode="lr-tb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1.428cm" fo:min-width="4.162cm" fo:padding-top="0.175cm" fo:padding-bottom="0.175cm" fo:padding-left="0.3cm" fo:padding-right="0.3cm" draw:shadow="hidden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2.021cm" fo:min-width="4.162cm" fo:padding-top="0.175cm" fo:padding-bottom="0.175cm" fo:padding-left="0.3cm" fo:padding-right="0.3cm" draw:shadow="hidden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2.02cm" fo:min-width="4.162cm" fo:padding-top="0.175cm" fo:padding-bottom="0.175cm" fo:padding-left="0.3cm" fo:padding-right="0.3cm" draw:shadow="hidden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541cm" fo:min-width="4.262cm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494cm" fo:min-width="4.262cm" style:writing-mode="lr-tb" loext:decorative="false"/>
      <style:paragraph-properties style:writing-mode="lr-tb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54cm" fo:min-width="4.262cm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.486cm" fo:min-width="4.262cm" style:writing-mode="lr-tb" loext:decorative="false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1.222cm" fo:min-width="2.735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1.515cm" fo:min-width="2.735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2.102cm" fo:min-width="2.735cm" fo:wrap-option="wrap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9pt" style:font-size-asian="9pt" style:font-size-complex="9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 style:writing-mode="lr-tb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8" style:family="paragraph">
      <style:paragraph-properties fo:text-align="center"/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398cm" svg:height="1.361cm" svg:x="-0.001cm" svg:y="0.226cm">
          <draw:text-box>
            <text:p text:style-name="P1"><text:span text:style-name="T1">NetCDF Classic Formats on Disk</text:span></text:p>
          </draw:text-box>
        </draw:frame>
        <draw:custom-shape draw:style-name="gr2" draw:text-style-name="P4" draw:layer="layout" svg:width="3.81cm" svg:height="2.223cm" svg:x="6.032cm" svg:y="1.269cm">
          <text:p text:style-name="P3"><text:span text:style-name="T2">Metadata is stored at the beginning of the file. In this example we have three fixed vars, and 3 record vars.</text:span></text:p>
          <draw:enhanced-geometry svg:viewBox="0 0 21600 21600" draw:text-areas="800 800 20800 20800" draw:type="round-rectangular-callout" draw:modifiers="-4675.93807399633 9887.050359712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g draw:style-name="gr3">
          <draw:custom-shape draw:style-name="gr4" draw:text-style-name="P6" draw:layer="layout" svg:width="4.762cm" svg:height="1.778cm" svg:x="0.317cm" svg:y="1.587cm">
            <text:p text:style-name="P5">Head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4.762cm" svg:height="2.371cm" svg:x="0.317cm" svg:y="3.3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4.762cm" svg:height="2.37cm" svg:x="0.317cm" svg:y="5.7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4.762cm" svg:height="2.371cm" svg:x="0.317cm" svg:y="8.1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4.762cm" svg:height="0.791cm" svg:x="0.317cm" svg:y="4.155cm">
            <text:p text:style-name="P8"><text:span text:style-name="T3">Fixed var 1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4.762cm" svg:height="0.744cm" svg:x="0.317cm" svg:y="4.946cm">
            <text:p text:style-name="P8"><text:span text:style-name="T3">Fixed var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4.762cm" svg:height="0.79cm" svg:x="0.317cm" svg:y="3.365cm">
            <text:p text:style-name="P8"><text:span text:style-name="T3">Fixed var 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4.762cm" svg:height="0.79cm" svg:x="0.317cm" svg:y="6.526cm">
            <text:p text:style-name="P8"><text:span text:style-name="T3">Record 0 of rec var 4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4.762cm" svg:height="0.736cm" svg:x="0.317cm" svg:y="7.316cm">
            <text:p text:style-name="P8"><text:span text:style-name="T3">Record 0 of rec var 5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4.762cm" svg:height="0.79cm" svg:x="0.317cm" svg:y="5.736cm">
            <text:p text:style-name="P8"><text:span text:style-name="T3">Record 0 of rec var 3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4.762cm" svg:height="0.79cm" svg:x="0.317cm" svg:y="8.897cm">
            <text:p text:style-name="P8"><text:span text:style-name="T3">Record 1 of rec var 4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4.762cm" svg:height="0.79cm" svg:x="0.317cm" svg:y="9.687cm">
            <text:p text:style-name="P8"><text:span text:style-name="T3">Record 1 of rec var 5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4.762cm" svg:height="0.791cm" svg:x="0.317cm" svg:y="8.106cm">
            <text:p text:style-name="P8"><text:span text:style-name="T3">Record 1 of rec var 3</text:span></text:p>
            <draw:enhanced-geometry svg:viewBox="0 0 21600 21600" draw:type="rectangle" draw:enhanced-path="M 0 0 L 21600 0 21600 21600 0 21600 0 0 Z N"/>
          </draw:custom-shape>
        </draw:g>
        <draw:custom-shape draw:style-name="gr11" draw:text-style-name="P4" draw:layer="layout" svg:width="3.493cm" svg:height="1.588cm" svg:x="6.032cm" svg:y="3.809cm">
          <text:p text:style-name="P3"><text:span text:style-name="T2">All vars with fixed dims are written contiguously.</text:span></text:p>
          <draw:enhanced-geometry svg:viewBox="0 0 21600 21600" draw:text-areas="800 800 20800 20800" draw:type="round-rectangular-callout" draw:modifiers="-4500.5151688609 9896.035242290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12" draw:text-style-name="P4" draw:layer="layout" svg:width="3.493cm" svg:height="1.905cm" svg:x="6.032cm" svg:y="5.715cm">
          <text:p text:style-name="P3"><text:span text:style-name="T2">All vars with an unlimited dim are written one record at a time.</text:span></text:p>
          <draw:enhanced-geometry svg:viewBox="0 0 21600 21600" draw:text-areas="800 800 20800 20800" draw:type="round-rectangular-callout" draw:modifiers="-4426.33085289067 9598.7408184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13" draw:text-style-name="P4" draw:layer="layout" svg:width="3.493cm" svg:height="2.54cm" svg:x="6.032cm" svg:y="7.937cm">
          <text:p text:style-name="P3"><text:span text:style-name="T2">Each time the unlimited dim is extended, a new record is added, containing room for all record vars.</text:span></text:p>
          <draw:enhanced-geometry svg:viewBox="0 0 21600 21600" draw:text-areas="800 800 20800 20800" draw:type="round-rectangular-callout" draw:modifiers="-4277.9622209502 8755.60802833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16cm" fo:page-height="10.9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1T05:58:40.482777638</meta:creation-date>
    <dc:date>2026-06-23T05:42:23.807001180</dc:date>
    <meta:editing-duration>PT9H41M43S</meta:editing-duration>
    <meta:editing-cycles>6</meta:editing-cycles>
    <meta:generator>LibreOffice/26.2.4.2$Linux_X86_64 LibreOffice_project/620$Build-2</meta:generator>
    <meta:document-statistic meta:object-count="19"/>
  </office:meta>
</office:document-meta>
</file>