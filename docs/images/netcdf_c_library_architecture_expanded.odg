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FF54F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02cm" loext:decorative="false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2.04cm" fo:padding-left="0.05cm" fo:padding-right="0.05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2.675cm" fo:padding-left="0.05cm" fo:padding-right="0.05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1.17cm" fo:padding-left="0.05cm" fo:padding-right="0.05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12.6cm" fo:padding-left="0.05cm" fo:padding-right="0.0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4.98cm" fo:padding-left="0.05cm" fo:padding-right="0.05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18.867cm" fo:padding-left="0.05cm" fo:padding-right="0.05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2.44cm" fo:padding-left="0.05cm" fo:padding-right="0.05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1.169cm" fo:padding-left="0.05cm" fo:padding-right="0.05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0.852cm" fo:padding-left="0.05cm" fo:padding-right="0.05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1.405cm" fo:padding-left="0.05cm" fo:padding-right="0.05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0.853cm" fo:padding-left="0.05cm" fo:padding-right="0.0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2cm" draw:fill="none" draw:textarea-vertical-align="middle" fo:padding-left="0.05cm" fo:padding-right="0.05cm" loext:decorative="false"/>
    </style:style>
    <style:style style:name="gr14" style:family="graphic" style:parent-style-name="objectwithoutfill">
      <style:graphic-properties draw:marker-end="Arrowheads_20_2" draw:marker-end-width="0.2cm" draw:fill="none" draw:textarea-vertical-align="middle" fo:padding-left="0.05cm" fo:padding-right="0.05cm" loext:decorative="false"/>
    </style:style>
    <style:style style:name="gr15" style:family="graphic" style:parent-style-name="objectwithoutfill">
      <style:graphic-properties draw:marker-end="Arrowheads_20_3" draw:marker-end-width="0.2cm" draw:fill="none" draw:textarea-vertical-align="middle" fo:padding-left="0.05cm" fo:padding-right="0.05cm" loext:decorative="false"/>
    </style:style>
    <style:style style:name="gr16" style:family="graphic" style:parent-style-name="objectwithoutfill">
      <style:graphic-properties draw:marker-end="Arrowheads_20_4" draw:marker-end-width="0.2cm" draw:fill="none" draw:textarea-vertical-align="middle" fo:padding-left="0.05cm" fo:padding-right="0.05cm" loext:decorative="false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 fo:min-height="0.345cm" fo:min-width="1.171cm" fo:padding-left="0.05cm" fo:padding-right="0.05cm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b2b2b2" draw:textarea-horizontal-align="justify" draw:textarea-vertical-align="middle" draw:auto-grow-height="false" fo:min-height="0.345cm" fo:min-width="0.771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b2b2b2" draw:textarea-horizontal-align="justify" draw:textarea-vertical-align="middle" draw:auto-grow-height="false" fo:min-height="0.345cm" fo:min-width="0.77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808080" draw:textarea-horizontal-align="justify" draw:textarea-vertical-align="middle" draw:auto-grow-height="false" fo:min-height="0.2cm" fo:min-width="2.195cm" style:writing-mode="lr-tb" loext:decorative="false"/>
      <style:paragraph-properties style:writing-mode="lr-tb"/>
    </style:style>
    <style:style style:name="gr21" style:family="graphic" style:parent-style-name="standard">
      <style:graphic-properties draw:fill="solid" draw:fill-color="#b2b2b2" draw:textarea-horizontal-align="justify" draw:textarea-vertical-align="middle" draw:auto-grow-height="false" fo:min-height="0.346cm" fo:min-width="1.089cm" style:writing-mode="lr-tb" loext:decorative="false"/>
      <style:paragraph-properties style:writing-mode="lr-tb"/>
    </style:style>
    <style:style style:name="gr22" style:family="graphic" style:parent-style-name="standard">
      <style:graphic-properties draw:fill="solid" draw:fill-color="#b2b2b2" draw:textarea-horizontal-align="justify" draw:textarea-vertical-align="middle" draw:auto-grow-height="false" fo:min-height="0.346cm" fo:min-width="0.771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b2b2b2" draw:textarea-horizontal-align="justify" draw:textarea-vertical-align="middle" draw:auto-grow-height="false" fo:min-height="0.346cm" fo:min-width="1.088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end="Arrowheads_20_5" draw:marker-end-width="0.2cm" draw:fill="none" draw:textarea-vertical-align="middle" loext:decorative="false"/>
    </style:style>
    <style:style style:name="gr25" style:family="graphic" style:parent-style-name="objectwithoutfill">
      <style:graphic-properties draw:marker-end="Arrowheads_20_6" draw:marker-end-width="0.2cm" draw:fill="none" draw:textarea-vertical-align="middle" loext:decorative="false"/>
    </style:style>
    <style:style style:name="gr26" style:family="graphic" style:parent-style-name="objectwithoutfill">
      <style:graphic-properties draw:marker-end="Arrowheads_20_7" draw:marker-end-width="0.2cm" draw:fill="none" draw:textarea-vertical-align="middle" loext:decorative="false"/>
    </style:style>
    <style:style style:name="gr27" style:family="graphic" style:parent-style-name="objectwithoutfill">
      <style:graphic-properties draw:marker-end="Arrowheads_20_8" draw:marker-end-width="0.2cm" draw:fill="none" draw:textarea-vertical-align="middle" loext:decorative="false"/>
    </style:style>
    <style:style style:name="gr28" style:family="graphic" style:parent-style-name="objectwithoutfill">
      <style:graphic-properties draw:marker-end="Arrowheads_20_9" draw:marker-end-width="0.2cm" draw:fill="none" draw:textarea-vertical-align="middle" loext:decorative="false"/>
    </style:style>
    <style:style style:name="gr29" style:family="graphic" style:parent-style-name="objectwithoutfill">
      <style:graphic-properties draw:marker-end="Arrowheads_20_11" draw:marker-end-width="0.2cm" draw:fill="none" draw:textarea-vertical-align="middle" loext:decorative="false"/>
    </style:style>
    <style:style style:name="gr30" style:family="graphic" style:parent-style-name="objectwithoutfill">
      <style:graphic-properties draw:marker-end="Arrowheads_20_12" draw:marker-end-width="0.2cm" draw:fill="none" draw:textarea-vertical-align="middle" loext:decorative="false"/>
    </style:style>
    <style:style style:name="gr31" style:family="graphic" style:parent-style-name="objectwithoutfill">
      <style:graphic-properties draw:marker-end="Arrowheads_20_13" draw:marker-end-width="0.2cm" draw:fill="none" draw:textarea-vertical-align="middle" fo:padding-left="0.05cm" fo:padding-right="0.05cm" loext:decorative="false"/>
    </style:style>
    <style:style style:name="gr32" style:family="graphic" style:parent-style-name="objectwithoutfill">
      <style:graphic-properties draw:marker-end="Arrowheads_20_14" draw:marker-end-width="0.2cm" draw:fill="none" draw:textarea-vertical-align="middle" fo:padding-left="0.05cm" fo:padding-right="0.05cm" loext:decorative="false"/>
    </style:style>
    <style:style style:name="gr33" style:family="graphic" style:parent-style-name="objectwithoutfill">
      <style:graphic-properties draw:marker-end="Arrowheads_20_15" draw:marker-end-width="0.2cm" draw:fill="none" draw:textarea-vertical-align="middle" fo:padding-left="0.05cm" fo:padding-right="0.05cm" loext:decorative="false"/>
    </style:style>
    <style:style style:name="gr34" style:family="graphic" style:parent-style-name="standard">
      <style:graphic-properties draw:fill="solid" draw:fill-color="#eeeeee" loext:fill-use-slide-background="false" draw:textarea-horizontal-align="justify" draw:textarea-vertical-align="middle" draw:auto-grow-height="false" fo:min-height="0.385cm" fo:min-width="1.17cm" fo:padding-left="0.05cm" fo:padding-right="0.05cm" style:writing-mode="lr-tb" loext:decorative="false"/>
      <style:paragraph-properties style:writing-mode="lr-tb"/>
    </style:style>
    <style:style style:name="gr35" style:family="graphic" style:parent-style-name="standard">
      <style:graphic-properties draw:fill="solid" draw:fill-color="#eeeeee" loext:fill-use-slide-background="false" draw:textarea-horizontal-align="justify" draw:textarea-vertical-align="middle" draw:auto-grow-height="false" fo:min-height="0.385cm" fo:min-width="0.852cm" fo:padding-left="0.05cm" fo:padding-right="0.05cm" style:writing-mode="lr-tb" loext:decorative="false"/>
      <style:paragraph-properties style:writing-mode="lr-tb"/>
    </style:style>
    <style:style style:name="gr36" style:family="graphic" style:parent-style-name="standard">
      <style:graphic-properties draw:fill="solid" draw:fill-color="#dddddd" draw:textarea-horizontal-align="justify" draw:textarea-vertical-align="middle" draw:auto-grow-height="false" fo:min-height="0.345cm" fo:min-width="1.088cm" style:writing-mode="lr-tb" loext:decorative="false"/>
      <style:paragraph-properties style:writing-mode="lr-tb"/>
    </style:style>
    <style:style style:name="gr37" style:family="graphic" style:parent-style-name="standard">
      <style:graphic-properties draw:fill="solid" draw:fill-color="#dddddd" draw:textarea-horizontal-align="justify" draw:textarea-vertical-align="middle" draw:auto-grow-height="false" fo:min-height="0.345cm" fo:min-width="0.77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font-size="8pt" style:font-size-asian="10pt" style:font-size-complex="10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8pt" style:font-size-asian="10pt" style:font-size-complex="10pt"/>
    </style:style>
    <style:style style:name="P5" style:family="paragraph">
      <style:paragraph-properties fo:text-align="center"/>
      <style:text-properties fo:font-size="8pt" style:font-size-asian="9pt" style:font-size-complex="9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8pt" style:font-size-asian="9pt" style:font-size-complex="9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center"/>
      <style:text-properties fo:font-size="8pt"/>
    </style:style>
    <style:style style:name="P10" style:family="paragraph">
      <loext:graphic-properties draw:fill="solid" draw:fill-color="#b2b2b2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fill="solid" draw:fill-color="#b2b2b2"/>
      <style:paragraph-properties fo:text-align="center" style:writing-mode="lr-tb"/>
      <style:text-properties fo:font-size="8pt" style:font-size-asian="10pt" style:font-size-complex="10pt"/>
    </style:style>
    <style:style style:name="P12" style:family="paragraph">
      <loext:graphic-properties draw:fill="solid" draw:fill-color="#808080"/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style:paragraph-properties fo:text-align="center"/>
      <style:text-properties fo:font-size="8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>
      <loext:graphic-properties draw:fill="solid" draw:fill-color="#eeeeee"/>
      <style:paragraph-properties fo:text-align="center" style:writing-mode="lr-tb"/>
      <style:text-properties fo:font-size="8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>
      <loext:graphic-properties draw:fill="solid" draw:fill-color="#dddddd"/>
      <style:paragraph-properties fo:text-align="center" style:writing-mode="lr-tb"/>
      <style:text-properties fo:font-size="8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size-asian="10pt" style:font-size-complex="10pt"/>
    </style:style>
    <style:style style:name="T3" style:family="text">
      <style:text-properties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7cm" svg:height="0.962cm" svg:x="4.445cm" svg:y="1cm">
          <draw:text-box>
            <text:p text:style-name="P1">NetCDF C Library <text:span text:style-name="T1">Expanded</text:span> Architecture</text:p>
          </draw:text-box>
        </draw:frame>
        <draw:custom-shape draw:style-name="gr2" draw:text-style-name="P4" draw:layer="layout" svg:width="2.54cm" svg:height="0.635cm" svg:x="2.905cm" svg:y="3.222cm">
          <text:p text:style-name="P3"><text:span text:style-name="T2">ncdu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175cm" svg:height="0.635cm" svg:x="7.668cm" svg:y="6.08cm">
          <text:p text:style-name="P3"><text:span text:style-name="T2">F77 API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0.635cm" svg:x="1.952cm" svg:y="7.985cm">
          <text:p text:style-name="P3"><text:span text:style-name="T2">libsrc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0.635cm" svg:x="17.827cm" svg:y="7.35cm">
          <text:p text:style-name="P3"><text:span text:style-name="T2">libdap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0.635cm" svg:x="16.557cm" svg:y="7.35cm">
          <text:p text:style-name="P3"><text:span text:style-name="T2">libdap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2.7cm" svg:height="0.635cm" svg:x="1.952cm" svg:y="7.35cm">
          <text:p text:style-name="P5"><text:span text:style-name="T3">libsrc4 (NetCDF4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0.635cm" svg:x="3.222cm" svg:y="7.985cm">
          <text:p text:style-name="P3"><text:span text:style-name="T2">libhdf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0.635cm" svg:x="8.302cm" svg:y="7.985cm">
          <text:p text:style-name="P3"><text:span text:style-name="T2">libhdf4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9.367cm" svg:height="0.635cm" svg:x="1cm" svg:y="6.715cm">
          <text:p text:style-name="P7"><text:span text:style-name="T4">libdisp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2.54cm" svg:height="0.635cm" svg:x="16.557cm" svg:y="8.62cm">
          <text:p text:style-name="P3"><text:span text:style-name="T2">libcur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269cm" svg:height="0.635cm" svg:x="16.558cm" svg:y="7.985cm">
          <text:p text:style-name="P3"><text:span text:style-name="T2">libo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0.635cm" svg:x="19.097cm" svg:y="7.35cm">
          <text:p text:style-name="P3"><text:span text:style-name="T2">libnczar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952cm" svg:height="0.635cm" svg:x="1cm" svg:y="7.35cm">
          <text:p text:style-name="P7"><text:span text:style-name="T4">lib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54cm" svg:height="0.635cm" svg:x="10.843cm" svg:y="6.08cm">
          <text:p text:style-name="P3"><text:span text:style-name="T2">V2 API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905cm" svg:height="0.635cm" svg:x="8.938cm" svg:y="5.445cm">
          <text:p text:style-name="P3"><text:span text:style-name="T2">F90 AP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0.635cm" svg:x="2.27cm" svg:y="3.857cm">
          <text:p text:style-name="P3"><text:span text:style-name="T2">ncco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953cm" svg:height="0.635cm" svg:x="5.127cm" svg:y="8.62cm">
          <text:p text:style-name="P3"><text:span text:style-name="T2">sz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54cm" svg:height="0.635cm" svg:x="1.635cm" svg:y="4.492cm">
          <text:p text:style-name="P3"><text:span text:style-name="T2">ncgen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2.54cm" svg:height="0.635cm" svg:x="1cm" svg:y="5.127cm">
          <text:p text:style-name="P7"><text:span text:style-name="T4">nc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54cm" svg:height="0.635cm" svg:x="13.7cm" svg:y="3.54cm">
          <text:p text:style-name="P3"><text:span text:style-name="T2">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54cm" svg:height="0.635cm" svg:x="8.303cm" svg:y="3.54cm">
          <text:p text:style-name="P3"><text:span text:style-name="T2">F90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54cm" svg:height="0.635cm" svg:x="6.715cm" svg:y="4.175cm">
          <text:p text:style-name="P3"><text:span text:style-name="T2">F77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5.128cm" svg:y1="3.857cm" svg:x2="5.128cm" svg:y2="6.715cm">
          <text:p/>
        </draw:line>
        <draw:line draw:style-name="gr14" draw:text-style-name="P9" draw:layer="layout" svg:x1="4.493cm" svg:y1="4.492cm" svg:x2="4.493cm" svg:y2="6.715cm">
          <text:p/>
        </draw:line>
        <draw:line draw:style-name="gr15" draw:text-style-name="P9" draw:layer="layout" svg:x1="3.858cm" svg:y1="5.127cm" svg:x2="3.858cm" svg:y2="6.715cm">
          <text:p/>
        </draw:line>
        <draw:line draw:style-name="gr16" draw:text-style-name="P9" draw:layer="layout" svg:x1="3.223cm" svg:y1="5.762cm" svg:x2="3.223cm" svg:y2="6.715cm">
          <text:p/>
        </draw:line>
        <draw:custom-shape draw:style-name="gr10" draw:text-style-name="P4" draw:layer="layout" svg:width="0.952cm" svg:height="0.635cm" svg:x="4.175cm" svg:y="8.62cm">
          <text:p text:style-name="P3"><text:span text:style-name="T2">z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953cm" svg:height="0.635cm" svg:x="3.222cm" svg:y="8.62cm">
          <text:p text:style-name="P3"><text:span text:style-name="T2">zst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27cm" svg:height="0.952cm" svg:x="1.635cm" svg:y="10.843cm">
          <text:p text:style-name="P7"><text:span text:style-name="T4">NetCDF classic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8" draw:text-style-name="P11" draw:layer="layout" svg:width="1.27cm" svg:height="0.952cm" svg:x="4.81cm" svg:y="10.843cm">
          <text:p text:style-name="P3"><text:span text:style-name="T2">HDF5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9" draw:text-style-name="P11" draw:layer="layout" svg:width="1.269cm" svg:height="0.952cm" svg:x="6.398cm" svg:y="10.842cm">
          <text:p text:style-name="P3"><text:span text:style-name="T2">HDF4 S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20" draw:text-style-name="P12" draw:layer="layout" svg:width="3.811cm" svg:height="0.636cm" svg:x="16.556cm" svg:y="9.572cm">
          <text:p text:style-name="P3"><text:span text:style-name="T2">netw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1.588cm" svg:height="0.953cm" svg:x="16.557cm" svg:y="13.064cm">
          <text:p text:style-name="P3"><text:span text:style-name="T2">NetCDF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22" draw:text-style-name="P11" draw:layer="layout" svg:width="1.27cm" svg:height="0.953cm" svg:x="19.097cm" svg:y="11.159cm">
          <text:p text:style-name="P3"><text:span text:style-name="T2">zar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23" draw:text-style-name="P11" draw:layer="layout" svg:width="1.587cm" svg:height="0.953cm" svg:x="17.828cm" svg:y="12.112cm">
          <text:p text:style-name="P3"><text:span text:style-name="T2">GRIB BUF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line draw:style-name="gr24" draw:text-style-name="P9" draw:layer="layout" svg:x1="5.445cm" svg:y1="9.255cm" svg:x2="5.445cm" svg:y2="10.842cm">
          <text:p/>
        </draw:line>
        <draw:line draw:style-name="gr25" draw:text-style-name="P9" draw:layer="layout" svg:x1="1.635cm" svg:y1="7.985cm" svg:x2="2.27cm" svg:y2="10.842cm">
          <text:p/>
        </draw:line>
        <draw:line draw:style-name="gr26" draw:text-style-name="P9" draw:layer="layout" svg:x1="8.938cm" svg:y1="8.62cm" svg:x2="7.032cm" svg:y2="10.842cm">
          <text:p/>
        </draw:line>
        <draw:line draw:style-name="gr27" draw:text-style-name="P9" draw:layer="layout" svg:x1="2.587cm" svg:y1="8.62cm" svg:x2="2.27cm" svg:y2="10.842cm">
          <text:p/>
        </draw:line>
        <draw:line draw:style-name="gr28" draw:text-style-name="P9" draw:layer="layout" svg:x1="17.51cm" svg:y1="9.255cm" svg:x2="17.51cm" svg:y2="13.065cm">
          <text:p/>
        </draw:line>
        <draw:line draw:style-name="gr29" draw:text-style-name="P9" draw:layer="layout" svg:x1="19.732cm" svg:y1="7.985cm" svg:x2="19.732cm" svg:y2="11.16cm">
          <text:p/>
        </draw:line>
        <draw:line draw:style-name="gr30" draw:text-style-name="P9" draw:layer="layout" svg:x1="17.51cm" svg:y1="9.255cm" svg:x2="18.462cm" svg:y2="12.112cm">
          <text:p/>
        </draw:line>
        <draw:line draw:style-name="gr31" draw:text-style-name="P9" draw:layer="layout" svg:x1="9.89cm" svg:y1="4.175cm" svg:x2="9.89cm" svg:y2="5.445cm">
          <text:p/>
        </draw:line>
        <draw:line draw:style-name="gr32" draw:text-style-name="P9" draw:layer="layout" svg:x1="8.303cm" svg:y1="4.81cm" svg:x2="8.303cm" svg:y2="6.08cm">
          <text:p/>
        </draw:line>
        <draw:line draw:style-name="gr33" draw:text-style-name="P9" draw:layer="layout" svg:x1="14.97cm" svg:y1="4.175cm" svg:x2="14.97cm" svg:y2="6.715cm">
          <text:p/>
        </draw:line>
        <draw:custom-shape draw:style-name="gr34" draw:text-style-name="P14" draw:layer="layout" svg:width="1.27cm" svg:height="0.635cm" svg:x="7.032cm" svg:y="8.62cm">
          <text:p text:style-name="P13"><text:span text:style-name="T5">bzi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0.952cm" svg:height="0.635cm" svg:x="6.08cm" svg:y="8.62cm">
          <text:p text:style-name="P13"><text:span text:style-name="T5">lz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4" draw:layer="layout" svg:width="1.27cm" svg:height="0.635cm" svg:x="9.572cm" svg:y="7.985cm">
          <text:p text:style-name="P13"><text:span text:style-name="T5">libgrib2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.27cm" svg:height="0.635cm" svg:x="10.842cm" svg:y="7.985cm">
          <text:p text:style-name="P13"><text:span text:style-name="T5">libcdf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.27cm" svg:height="0.635cm" svg:x="12.112cm" svg:y="7.985cm">
          <text:p text:style-name="P13"><text:span text:style-name="T5">libfits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.27cm" svg:height="0.635cm" svg:x="13.382cm" svg:y="7.985cm">
          <text:p text:style-name="P13"><text:span text:style-name="T5">libpds4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1.587cm" svg:height="0.952cm" svg:x="9.255cm" svg:y="9.255cm">
          <text:p text:style-name="P13"><text:span text:style-name="T5">GRI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37" draw:text-style-name="P15" draw:layer="layout" svg:width="1.269cm" svg:height="0.952cm" svg:x="10.842cm" svg:y="10.208cm">
          <text:p text:style-name="P13"><text:span text:style-name="T5">CDF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37" draw:text-style-name="P15" draw:layer="layout" svg:width="1.269cm" svg:height="0.952cm" svg:x="12.112cm" svg:y="11.16cm">
          <text:p text:style-name="P13"><text:span text:style-name="T5">FI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37" draw:text-style-name="P15" draw:layer="layout" svg:width="1.269cm" svg:height="0.952cm" svg:x="13.383cm" svg:y="12.113cm">
          <text:p text:style-name="P13"><text:span text:style-name="T5">PDS4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line draw:style-name="gr28" draw:text-style-name="P9" draw:layer="layout" svg:x1="10.207cm" svg:y1="8.62cm" svg:x2="10.207cm" svg:y2="9.255cm">
          <text:p/>
        </draw:line>
        <draw:line draw:style-name="gr28" draw:text-style-name="P9" draw:layer="layout" svg:x1="11.477cm" svg:y1="8.62cm" svg:x2="11.477cm" svg:y2="10.207cm">
          <text:p/>
        </draw:line>
        <draw:line draw:style-name="gr28" draw:text-style-name="P9" draw:layer="layout" svg:x1="12.747cm" svg:y1="8.62cm" svg:x2="12.747cm" svg:y2="11.16cm">
          <text:p/>
        </draw:line>
        <draw:line draw:style-name="gr28" draw:text-style-name="P9" draw:layer="layout" svg:x1="14.017cm" svg:y1="8.62cm" svg:x2="14.017cm" svg:y2="12.11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30T06:48:32.209614921</meta:creation-date>
    <dc:date>2026-07-19T11:15:38.484784528</dc:date>
    <meta:editing-duration>PT1H39M5S</meta:editing-duration>
    <meta:editing-cycles>6</meta:editing-cycles>
    <meta:generator>LibreOffice/26.2.4.2$Linux_X86_64 LibreOffice_project/620$Build-2</meta:generator>
    <meta:document-statistic meta:object-count="60"/>
  </office:meta>
</office:document-meta>
</file>