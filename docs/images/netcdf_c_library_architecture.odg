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9.025cm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7.598cm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404cm" loext:decorative="false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722cm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0.77cm" loext:decorative="false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2cm" draw:fill="none" draw:textarea-vertical-align="middle" loext:decorative="false"/>
    </style:style>
    <style:style style:name="gr13" style:family="graphic" style:parent-style-name="objectwithoutfill">
      <style:graphic-properties draw:marker-end="Arrowheads_20_2" draw:marker-end-width="0.2cm" draw:fill="none" draw:textarea-vertical-align="middle" loext:decorative="false"/>
    </style:style>
    <style:style style:name="gr14" style:family="graphic" style:parent-style-name="objectwithoutfill">
      <style:graphic-properties draw:marker-end="Arrowheads_20_3" draw:marker-end-width="0.2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2cm" draw:fill="none" draw:textarea-vertical-align="middle" loext:decorative="false"/>
    </style:style>
    <style:style style:name="gr16" style:family="graphic" style:parent-style-name="standard">
      <style:graphic-properties draw:fill="solid" draw:fill-color="#b2b2b2" draw:textarea-horizontal-align="justify" draw:textarea-vertical-align="middle" draw:auto-grow-height="false" fo:min-height="0.345cm" fo:min-width="1.724cm" loext:decorative="false"/>
      <style:paragraph-properties style:writing-mode="lr-tb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0.345cm" fo:min-width="1.723cm" loext:decorative="false"/>
      <style:paragraph-properties style:writing-mode="lr-tb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0.2cm" fo:min-width="3.767cm" loext:decorative="false"/>
      <style:paragraph-properties style:writing-mode="lr-tb"/>
    </style:style>
    <style:style style:name="gr19" style:family="graphic" style:parent-style-name="standard">
      <style:graphic-properties draw:fill="solid" draw:fill-color="#b2b2b2" draw:textarea-horizontal-align="justify" draw:textarea-vertical-align="middle" draw:auto-grow-height="false" fo:min-height="0.346cm" fo:min-width="1.724cm" loext:decorative="false"/>
      <style:paragraph-properties style:writing-mode="lr-tb"/>
    </style:style>
    <style:style style:name="gr20" style:family="graphic" style:parent-style-name="standard">
      <style:graphic-properties draw:fill="solid" draw:fill-color="#b2b2b2" draw:textarea-horizontal-align="justify" draw:textarea-vertical-align="middle" draw:auto-grow-height="false" fo:min-height="0.346cm" fo:min-width="1.406cm" loext:decorative="false"/>
      <style:paragraph-properties style:writing-mode="lr-tb"/>
    </style:style>
    <style:style style:name="gr21" style:family="graphic" style:parent-style-name="standard">
      <style:graphic-properties draw:fill="solid" draw:fill-color="#b2b2b2" draw:textarea-horizontal-align="justify" draw:textarea-vertical-align="middle" draw:auto-grow-height="false" fo:min-height="0.346cm" fo:min-width="1.723cm" loext:decorative="false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2cm" draw:fill="none" draw:textarea-vertical-align="middle" loext:decorative="false"/>
    </style:style>
    <style:style style:name="gr23" style:family="graphic" style:parent-style-name="objectwithoutfill">
      <style:graphic-properties draw:marker-end="Arrowheads_20_6" draw:marker-end-width="0.2cm" draw:fill="none" draw:textarea-vertical-align="middle" loext:decorative="false"/>
    </style:style>
    <style:style style:name="gr24" style:family="graphic" style:parent-style-name="objectwithoutfill">
      <style:graphic-properties draw:marker-end="Arrowheads_20_7" draw:marker-end-width="0.2cm" draw:fill="none" draw:textarea-vertical-align="middle" loext:decorative="false"/>
    </style:style>
    <style:style style:name="gr25" style:family="graphic" style:parent-style-name="objectwithoutfill">
      <style:graphic-properties draw:marker-end="Arrowheads_20_8" draw:marker-end-width="0.2cm" draw:fill="none" draw:textarea-vertical-align="middle" loext:decorative="false"/>
    </style:style>
    <style:style style:name="gr26" style:family="graphic" style:parent-style-name="objectwithoutfill">
      <style:graphic-properties draw:marker-end="Arrowheads_20_9" draw:marker-end-width="0.2cm" draw:fill="none" draw:textarea-vertical-align="middle" loext:decorative="false"/>
    </style:style>
    <style:style style:name="gr27" style:family="graphic" style:parent-style-name="objectwithoutfill">
      <style:graphic-properties draw:marker-end="Arrowheads_20_11" draw:marker-end-width="0.2cm" draw:fill="none" draw:textarea-vertical-align="middle" loext:decorative="false"/>
    </style:style>
    <style:style style:name="gr28" style:family="graphic" style:parent-style-name="objectwithoutfill">
      <style:graphic-properties draw:marker-end="Arrowheads_20_12" draw:marker-end-width="0.2cm" draw:fill="none" draw:textarea-vertical-align="middle" loext:decorative="false"/>
    </style:style>
    <style:style style:name="gr29" style:family="graphic" style:parent-style-name="objectwithoutfill">
      <style:graphic-properties draw:marker-end="Arrowheads_20_13" draw:marker-end-width="0.2cm" draw:fill="none" draw:textarea-vertical-align="middle" loext:decorative="false"/>
    </style:style>
    <style:style style:name="gr30" style:family="graphic" style:parent-style-name="objectwithoutfill">
      <style:graphic-properties draw:marker-end="Arrowheads_20_14" draw:marker-end-width="0.2cm" draw:fill="none" draw:textarea-vertical-align="middle" loext:decorative="false"/>
    </style:style>
    <style:style style:name="gr31" style:family="graphic" style:parent-style-name="objectwithoutfill">
      <style:graphic-properties draw:marker-end="Arrowheads_20_15" draw:marker-end-width="0.2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07cm" svg:height="1.27cm" svg:x="6.715cm" svg:y="1.952cm">
          <draw:text-box>
            <text:p>NetCDF C Library Architecture</text:p>
          </draw:text-box>
        </draw:frame>
        <draw:custom-shape draw:style-name="gr2" draw:text-style-name="P3" draw:layer="layout" svg:width="2.54cm" svg:height="0.635cm" svg:x="3.222cm" svg:y="3.222cm">
          <text:p text:style-name="P2"><text:span text:style-name="T1">ncdu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75cm" svg:height="0.635cm" svg:x="7.985cm" svg:y="6.08cm">
          <text:p text:style-name="P2"><text:span text:style-name="T1">F77 AP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0.635cm" svg:x="3.857cm" svg:y="7.985cm">
          <text:p text:style-name="P2"><text:span text:style-name="T1">libsrc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0.635cm" svg:x="15.287cm" svg:y="7.35cm">
          <text:p text:style-name="P2"><text:span text:style-name="T1">libdap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0.635cm" svg:x="13.382cm" svg:y="7.35cm">
          <text:p text:style-name="P2"><text:span text:style-name="T1">libdap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525cm" svg:height="0.635cm" svg:x="3.857cm" svg:y="7.35cm">
          <text:p text:style-name="P2"><text:span text:style-name="T1">libsrc4 (NetCDF4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0.635cm" svg:x="5.762cm" svg:y="7.985cm">
          <text:p text:style-name="P2"><text:span text:style-name="T1">libhdf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0.635cm" svg:x="10.207cm" svg:y="7.985cm">
          <text:p text:style-name="P2"><text:span text:style-name="T1">libhdf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098cm" svg:height="0.635cm" svg:x="1.317cm" svg:y="6.715cm">
          <text:p text:style-name="P2"><text:span text:style-name="T1">libdisp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81cm" svg:height="0.635cm" svg:x="13.382cm" svg:y="8.62cm">
          <text:p text:style-name="P2"><text:span text:style-name="T1">libcur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904cm" svg:height="0.635cm" svg:x="13.383cm" svg:y="7.985cm">
          <text:p text:style-name="P2"><text:span text:style-name="T1">libo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222cm" svg:height="0.635cm" svg:x="17.192cm" svg:y="7.35cm">
          <text:p text:style-name="P2"><text:span text:style-name="T1">libnczar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1.317cm" svg:y="7.35cm">
          <text:p text:style-name="P2"><text:span text:style-name="T1">libsr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11.16cm" svg:y="6.08cm">
          <text:p text:style-name="P2"><text:span text:style-name="T1">V2 AP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0.635cm" svg:x="9.255cm" svg:y="5.445cm">
          <text:p text:style-name="P2"><text:span text:style-name="T1">F90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2.587cm" svg:y="3.857cm">
          <text:p text:style-name="P2"><text:span text:style-name="T1">ncco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27cm" svg:height="0.635cm" svg:x="8.302cm" svg:y="8.62cm">
          <text:p text:style-name="P2"><text:span text:style-name="T1">sz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0.635cm" svg:x="1.952cm" svg:y="4.492cm">
          <text:p text:style-name="P2"><text:span text:style-name="T1">ncgen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0.635cm" svg:x="1.317cm" svg:y="5.127cm">
          <text:p text:style-name="P2"><text:span text:style-name="T1">nc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0.635cm" svg:x="14.017cm" svg:y="3.54cm">
          <text:p text:style-name="P2"><text:span text:style-name="T1">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0.635cm" svg:x="8.62cm" svg:y="3.54cm">
          <text:p text:style-name="P2"><text:span text:style-name="T1">F90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0.635cm" svg:x="7.032cm" svg:y="4.175cm">
          <text:p text:style-name="P2"><text:span text:style-name="T1">F77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5.445cm" svg:y1="3.857cm" svg:x2="5.445cm" svg:y2="6.715cm">
          <text:p/>
        </draw:line>
        <draw:line draw:style-name="gr13" draw:text-style-name="P4" draw:layer="layout" svg:x1="4.81cm" svg:y1="4.492cm" svg:x2="4.81cm" svg:y2="6.715cm">
          <text:p/>
        </draw:line>
        <draw:line draw:style-name="gr14" draw:text-style-name="P4" draw:layer="layout" svg:x1="4.175cm" svg:y1="5.127cm" svg:x2="4.175cm" svg:y2="6.715cm">
          <text:p/>
        </draw:line>
        <draw:line draw:style-name="gr15" draw:text-style-name="P4" draw:layer="layout" svg:x1="3.54cm" svg:y1="5.762cm" svg:x2="3.54cm" svg:y2="6.715cm">
          <text:p/>
        </draw:line>
        <draw:custom-shape draw:style-name="gr11" draw:text-style-name="P3" draw:layer="layout" svg:width="1.27cm" svg:height="0.635cm" svg:x="7.032cm" svg:y="8.62cm">
          <text:p text:style-name="P2"><text:span text:style-name="T1">z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27cm" svg:height="0.635cm" svg:x="5.762cm" svg:y="8.62cm">
          <text:p text:style-name="P2"><text:span text:style-name="T1">z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2.223cm" svg:height="0.952cm" svg:x="1.317cm" svg:y="10.843cm">
          <text:p text:style-name="P2"><text:span text:style-name="T1">NetCDF classic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17" draw:text-style-name="P5" draw:layer="layout" svg:width="2.222cm" svg:height="0.952cm" svg:x="6.08cm" svg:y="10.842cm">
          <text:p text:style-name="P2"><text:span text:style-name="T1">HDF5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17" draw:text-style-name="P5" draw:layer="layout" svg:width="2.222cm" svg:height="0.952cm" svg:x="10.207cm" svg:y="10.843cm">
          <text:p text:style-name="P2"><text:span text:style-name="T1">HDF4 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18" draw:text-style-name="P7" draw:layer="layout" svg:width="6.033cm" svg:height="0.636cm" svg:x="13.382cm" svg:y="10.207cm">
          <text:p text:style-name="P6"><text:span text:style-name="T1">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.223cm" svg:height="0.953cm" svg:x="12.747cm" svg:y="12.112cm">
          <text:p text:style-name="P2"><text:span text:style-name="T1">NetCD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20" draw:text-style-name="P5" draw:layer="layout" svg:width="1.905cm" svg:height="0.953cm" svg:x="17.827cm" svg:y="12.112cm">
          <text:p text:style-name="P2"><text:span text:style-name="T1">zar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21" draw:text-style-name="P5" draw:layer="layout" svg:width="2.222cm" svg:height="0.953cm" svg:x="15.287cm" svg:y="12.112cm">
          <text:p text:style-name="P2"><text:span text:style-name="T1">GRIB/BUF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line draw:style-name="gr22" draw:text-style-name="P4" draw:layer="layout" svg:x1="7.35cm" svg:y1="9.255cm" svg:x2="7.35cm" svg:y2="10.842cm">
          <text:p/>
        </draw:line>
        <draw:line draw:style-name="gr23" draw:text-style-name="P4" draw:layer="layout" svg:x1="2.587cm" svg:y1="7.985cm" svg:x2="2.587cm" svg:y2="10.842cm">
          <text:p/>
        </draw:line>
        <draw:line draw:style-name="gr24" draw:text-style-name="P4" draw:layer="layout" svg:x1="11.16cm" svg:y1="8.62cm" svg:x2="11.16cm" svg:y2="10.842cm">
          <text:p/>
        </draw:line>
        <draw:line draw:style-name="gr25" draw:text-style-name="P4" draw:layer="layout" svg:x1="4.81cm" svg:y1="8.62cm" svg:x2="2.587cm" svg:y2="10.842cm">
          <text:p/>
        </draw:line>
        <draw:line draw:style-name="gr26" draw:text-style-name="P4" draw:layer="layout" svg:x1="14.017cm" svg:y1="9.255cm" svg:x2="14.017cm" svg:y2="12.112cm">
          <text:p/>
        </draw:line>
        <draw:line draw:style-name="gr27" draw:text-style-name="P4" draw:layer="layout" svg:x1="18.78cm" svg:y1="7.985cm" svg:x2="18.78cm" svg:y2="12.112cm">
          <text:p/>
        </draw:line>
        <draw:line draw:style-name="gr28" draw:text-style-name="P4" draw:layer="layout" svg:x1="16.557cm" svg:y1="9.255cm" svg:x2="16.557cm" svg:y2="12.112cm">
          <text:p/>
        </draw:line>
        <draw:line draw:style-name="gr29" draw:text-style-name="P4" draw:layer="layout" svg:x1="10.207cm" svg:y1="4.175cm" svg:x2="10.207cm" svg:y2="5.445cm">
          <text:p/>
        </draw:line>
        <draw:line draw:style-name="gr30" draw:text-style-name="P4" draw:layer="layout" svg:x1="8.62cm" svg:y1="4.81cm" svg:x2="8.62cm" svg:y2="6.08cm">
          <text:p/>
        </draw:line>
        <draw:line draw:style-name="gr31" draw:text-style-name="P4" draw:layer="layout" svg:x1="15.287cm" svg:y1="4.175cm" svg:x2="15.287cm" svg:y2="6.7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06:48:32.209614921</meta:creation-date>
    <dc:date>2026-07-02T06:26:00.655519626</dc:date>
    <meta:editing-duration>PT40M28S</meta:editing-duration>
    <meta:editing-cycles>4</meta:editing-cycles>
    <meta:generator>LibreOffice/26.2.4.2$Linux_X86_64 LibreOffice_project/620$Build-2</meta:generator>
    <meta:document-statistic meta:object-count="46"/>
  </office:meta>
</office:document-meta>
</file>